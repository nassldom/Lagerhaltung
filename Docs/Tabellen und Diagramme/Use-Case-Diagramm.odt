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Heading_20_2">
      <style:text-properties style:text-underline-style="solid" style:text-underline-width="auto" style:text-underline-color="font-color"/>
    </style:style>
    <style:style style:name="P2" style:family="paragraph" style:parent-style-name="Text_20_body">
      <style:paragraph-properties fo:margin-left="0cm" fo:margin-right="0cm" fo:text-indent="0cm" style:auto-text-indent="false" fo:padding="0cm" fo:border="none"/>
    </style:style>
    <style:style style:name="P3" style:family="paragraph" style:parent-style-name="Heading_20_2">
      <style:paragraph-properties fo:margin-left="0cm" fo:margin-right="0cm" fo:text-indent="0cm" style:auto-text-indent="false" fo:padding="0cm" fo:border="none"/>
      <style:text-properties style:text-underline-style="solid" style:text-underline-width="auto" style:text-underline-color="font-color"/>
    </style:style>
    <style:style style:name="P4" style:family="paragraph" style:parent-style-name="Preformatted_20_Text">
      <style:paragraph-properties fo:margin-left="0cm" fo:margin-right="0cm" fo:text-indent="0cm" style:auto-text-indent="false" fo:padding="0cm" fo:border="none"/>
      <style:text-properties loext:padding="0cm" loext:border="none"/>
    </style:style>
    <style:style style:name="P5" style:family="paragraph" style:parent-style-name="Preformatted_20_Text">
      <style:paragraph-properties fo:margin-left="0cm" fo:margin-right="0cm" fo:text-indent="0cm" style:auto-text-indent="false" fo:padding="0cm" fo:border="none"/>
    </style:style>
    <style:style style:name="P6" style:family="paragraph" style:parent-style-name="Preformatted_20_Text">
      <style:paragraph-properties fo:margin-left="0cm" fo:margin-right="0cm" fo:margin-top="0cm" fo:margin-bottom="0.499cm" style:contextual-spacing="false" fo:text-indent="0cm" style:auto-text-indent="false" fo:padding="0cm" fo:border="none"/>
    </style:style>
    <style:style style:name="T1" style:family="text">
      <style:text-properties loext:padding="0cm" loext: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bookmark text:name="beschreibung-des-use-case-diagramms"/>Beschreibung des Use-Case-Diagramms</text:h>
      <text:p text:style-name="P2"/>
      <text:p text:style-name="P2">Das Use-Case-Diagramm zeigt die fachlichen Anwendungsfälle der Lagerverwaltungsanwendung aus Sicht des Benutzers. Der Benutzer kann Artikel anlegen, anzeigen und suchen sowie Lagerzugänge und Lagerabgänge durchführen. Darüber hinaus ermöglicht die Anwendung die Prüfung kritischer Mindestbestände, die Anzeige der Bewegungs-Historie und die Bereitstellung einfacher Lagerstatistiken. Ergänzend wurden Funktionen für das Speichern und Laden von Pokémon-Karten über eine SQLite-Datenbank berücksichtigt. Das Diagramm macht deutlich, dass die Anwendung auf typische Aufgaben der Bestands- und Bewegungsverwaltung ausgerichtet ist.</text:p>
      <text:p text:style-name="Text_20_body"/>
      <text:h text:style-name="P3" text:outline-level="2"><text:bookmark text:name="use-case-diagramm"/>Use-Case-Diagramm</text:h>
      <text:p text:style-name="P2"/>
      <text:p text:style-name="P2">Das folgende Use-Case-Diagramm stellt die wichtigsten Anwendungsfälle aus Sicht des Benutzers dar. Der Benutzer interagiert ausschließlich über die Konsolenoberfläche mit der Anwendung. Zu den zentralen Aufgaben zählen das Anlegen, Suchen und Anzeigen von Artikeln, die Durchführung von Lagerzugängen und Lagerabgängen, die Prüfung kritischer Bestände, die Einsicht in die Buchungshistorie sowie der Zugriff auf statistische Auswertungen. Zusätzlich können ausgewählte Datensätze in die SQLite-Datenbank gespeichert und aus dieser wieder geladen werden. Das Diagramm verdeutlicht damit, welche fachlichen Funktionen die Anwendung bereitstellt und welche Interaktionen im Mittelpunkt des Projektes stehen.</text:p>
      <text:p text:style-name="P4"/>
      <text:p text:style-name="P5"><text:span text:style-name="Source_20_Text"><text:span text:style-name="T1">flowchart LR</text:span></text:span></text:p>
      <text:p text:style-name="P5"><text:span text:style-name="Source_20_Text"><text:span text:style-name="T1">U[Benutzer]</text:span></text:span></text:p>
      <text:p text:style-name="P5"><text:span text:style-name="Source_20_Text"><text:span text:style-name="T1">UC1((Artikel anlegen))</text:span></text:span></text:p>
      <text:p text:style-name="P5"><text:span text:style-name="Source_20_Text"><text:span text:style-name="T1">UC2((Artikel anzeigen))</text:span></text:span></text:p>
      <text:p text:style-name="P5"><text:span text:style-name="Source_20_Text"><text:span text:style-name="T1">UC3((Artikel suchen))</text:span></text:span></text:p>
      <text:p text:style-name="P5"><text:span text:style-name="Source_20_Text"><text:span text:style-name="T1">UC4((Bestand erhöhen))</text:span></text:span></text:p>
      <text:p text:style-name="P5"><text:span text:style-name="Source_20_Text"><text:span text:style-name="T1">UC5((Bestand verringern))</text:span></text:span></text:p>
      <text:p text:style-name="P5"><text:span text:style-name="Source_20_Text"><text:span text:style-name="T1">UC6((Mindestbestände prüfen))</text:span></text:span></text:p>
      <text:p text:style-name="P5"><text:span text:style-name="Source_20_Text"><text:span text:style-name="T1">UC7((Bewegungs-Historie anzeigen))</text:span></text:span></text:p>
      <text:p text:style-name="P5"><text:span text:style-name="Source_20_Text"><text:span text:style-name="T1">UC8((Lagerstatistik anzeigen))</text:span></text:span></text:p>
      <text:p text:style-name="P5"><text:span text:style-name="Source_20_Text"><text:span text:style-name="T1">UC9((PokemonCards in DB speichern))</text:span></text:span></text:p>
      <text:p text:style-name="P5"><text:span text:style-name="Source_20_Text"><text:span text:style-name="T1">UC10((PokemonCards aus DB laden))</text:span></text:span></text:p>
      <text:p text:style-name="P5"/>
      <text:p text:style-name="P5"><text:span text:style-name="Source_20_Text"><text:span text:style-name="T1">U --&gt; UC1</text:span></text:span></text:p>
      <text:p text:style-name="P5"><text:span text:style-name="Source_20_Text"><text:span text:style-name="T1">U --&gt; UC2</text:span></text:span></text:p>
      <text:p text:style-name="P5"><text:span text:style-name="Source_20_Text"><text:span text:style-name="T1">U --&gt; UC3</text:span></text:span></text:p>
      <text:p text:style-name="P5"><text:span text:style-name="Source_20_Text"><text:span text:style-name="T1">U --&gt; UC4</text:span></text:span></text:p>
      <text:p text:style-name="P5"><text:span text:style-name="Source_20_Text"><text:span text:style-name="T1">U --&gt; UC5</text:span></text:span></text:p>
      <text:p text:style-name="P5"><text:span text:style-name="Source_20_Text"><text:span text:style-name="T1">U --&gt; UC6</text:span></text:span></text:p>
      <text:p text:style-name="P5"><text:span text:style-name="Source_20_Text"><text:span text:style-name="T1">U --&gt; UC7</text:span></text:span></text:p>
      <text:p text:style-name="P5"><text:span text:style-name="Source_20_Text"><text:span text:style-name="T1">U --&gt; UC8</text:span></text:span></text:p>
      <text:p text:style-name="P5"><text:span text:style-name="Source_20_Text"><text:span text:style-name="T1">U --&gt; UC9</text:span></text:span></text:p>
      <text:p text:style-name="P6"><text:span text:style-name="Source_20_Text"><text:span text:style-name="T1">U --&gt; UC10</text:span></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7T17:33:37.501578015</meta:creation-date>
    <dc:date>2026-05-11T11:26:19.470409984</dc:date>
    <meta:editing-duration>PT4M52S</meta:editing-duration>
    <meta:editing-cycles>3</meta:editing-cycles>
    <meta:generator>LibreOffice/26.2.2.2$Linux_X86_64 LibreOffice_project/620$Build-2</meta:generator>
    <meta:document-statistic meta:table-count="0" meta:image-count="0" meta:object-count="0" meta:page-count="1" meta:paragraph-count="26" meta:word-count="231" meta:character-count="1771" meta:non-whitespace-character-count="1576"/>
  </office:meta>
</office:document-meta>
</file>