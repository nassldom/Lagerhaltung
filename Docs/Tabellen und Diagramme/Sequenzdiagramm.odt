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2">
      <style:text-properties style:text-underline-style="solid" style:text-underline-width="auto" style:text-underline-color="font-color" loext:padding="0cm" loext:border="none"/>
    </style:style>
    <style:style style:name="P2" style:family="paragraph" style:parent-style-name="Text_20_body">
      <style:paragraph-properties fo:margin-left="0cm" fo:margin-right="0cm" fo:text-indent="0cm" style:auto-text-indent="false" fo:padding="0cm" fo:border="none"/>
      <style:text-properties loext:padding="0cm" loext:border="none"/>
    </style:style>
    <style:style style:name="P3" style:family="paragraph" style:parent-style-name="Preformatted_20_Text">
      <style:paragraph-properties fo:margin-left="0cm" fo:margin-right="0cm" fo:text-indent="0cm" style:auto-text-indent="false" fo:padding="0cm" fo:border="none"/>
      <style:text-properties loext:padding="0cm" loext:border="none"/>
    </style:style>
    <style:style style:name="P4" style:family="paragraph" style:parent-style-name="Preformatted_20_Text">
      <style:paragraph-properties fo:margin-left="0cm" fo:margin-right="0cm" fo:text-indent="0cm" style:auto-text-indent="false" fo:padding="0cm" fo:border="none"/>
    </style:style>
    <style:style style:name="P5"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6" style:family="paragraph" style:parent-style-name="Text_20_body">
      <style:paragraph-properties fo:margin-left="0cm" fo:margin-right="0cm" fo:text-indent="0cm" style:auto-text-indent="false"/>
    </style:style>
    <style:style style:name="T1" style:family="text">
      <style:text-properties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beschreibung-des-sequenzdiagramms"/>Beschreibung des Sequenzdiagramms</text:h>
      <text:p text:style-name="P2"/>
      <text:p text:style-name="P2">Das folgende Sequenzdiagramm zeigt den Ablauf beim Hinzufügen einer neuen Pokémon-Karte in der Anwendung. Der Benutzer gibt die Daten über die Konsole ein. Die Benutzeroberfläche übergibt diese Daten an die fachliche Logik, welche die Validierung und Verarbeitung übernimmt. Anschließend wird die Karte an das Repository weitergegeben, das den Datensatz in der SQLite-Datenbank speichert. Das Diagramm verdeutlicht damit den Zusammenspiel von Benutzeroberfläche, Fachlogik und Persistenzschicht.</text:p>
      <text:p text:style-name="P3"/>
      <text:p text:style-name="P4"><text:span text:style-name="Source_20_Text"><text:span text:style-name="T1"/></text:span></text:p>
      <text:p text:style-name="P4"><text:span text:style-name="Source_20_Text"><text:span text:style-name="T1">sequenceDiagram</text:span></text:span></text:p>
      <text:p text:style-name="P4"><text:span text:style-name="Source_20_Text"><text:span text:style-name="T1"><text:s text:c="4"/>actor Benutzer</text:span></text:span></text:p>
      <text:p text:style-name="P4"><text:span text:style-name="Source_20_Text"><text:span text:style-name="T1"><text:s text:c="4"/>participant UI as ConsoleMenu</text:span></text:span></text:p>
      <text:p text:style-name="P4"><text:span text:style-name="Source_20_Text"><text:span text:style-name="T1"><text:s text:c="4"/>participant Inventory as Inventory</text:span></text:span></text:p>
      <text:p text:style-name="P4"><text:span text:style-name="Source_20_Text"><text:span text:style-name="T1"><text:s text:c="4"/>participant Repo as PokemonCardRepository</text:span></text:span></text:p>
      <text:p text:style-name="P4"><text:span text:style-name="Source_20_Text"><text:span text:style-name="T1"><text:s text:c="4"/>participant DB as SQLite-Datenbank</text:span></text:span></text:p>
      <text:p text:style-name="P4"/>
      <text:p text:style-name="P4"><text:span text:style-name="Source_20_Text"><text:span text:style-name="T1"><text:s text:c="4"/>Benutzer-&gt;&gt;UI: Eingabe einer neuen PokemonCard</text:span></text:span></text:p>
      <text:p text:style-name="P4"><text:span text:style-name="Source_20_Text"><text:span text:style-name="T1"><text:s text:c="4"/>UI-&gt;&gt;Inventory: PokemonCard anlegen / übergeben</text:span></text:span></text:p>
      <text:p text:style-name="P4"><text:span text:style-name="Source_20_Text"><text:span text:style-name="T1"><text:s text:c="4"/>Inventory-&gt;&gt;Repo: save(pokemonCard)</text:span></text:span></text:p>
      <text:p text:style-name="P4"><text:span text:style-name="Source_20_Text"><text:span text:style-name="T1"><text:s text:c="4"/>Repo-&gt;&gt;DB: INSERT INTO pokemon_cards ...</text:span></text:span></text:p>
      <text:p text:style-name="P4"><text:span text:style-name="Source_20_Text"><text:span text:style-name="T1"><text:s text:c="4"/>DB--&gt;&gt;Repo: Erfolg</text:span></text:span></text:p>
      <text:p text:style-name="P4"><text:span text:style-name="Source_20_Text"><text:span text:style-name="T1"><text:s text:c="4"/>Repo--&gt;&gt;Inventory: abgeschlossen</text:span></text:span></text:p>
      <text:p text:style-name="P4"><text:span text:style-name="Source_20_Text"><text:span text:style-name="T1"><text:s text:c="4"/>Inventory--&gt;&gt;UI: Rückmeldung erfolgreich</text:span></text:span></text:p>
      <text:p text:style-name="P5"><text:span text:style-name="Source_20_Text"><text:span text:style-name="T1"><text:s text:c="4"/>UI--&gt;&gt;Benutzer: Bestätigung anzeigen</text:span></text:span></text:p>
      <text:p text:style-name="P2"/>
      <text:p text:style-name="P2">Das Sequenzdiagramm beschreibt den zeitlichen Ablauf beim Speichern einer Pokémon-Karte. Zunächst erfasst der Benutzer die Daten über die Konsolenoberfläche. Die Benutzeroberfläche übergibt das neu erzeugte Objekt an die fachliche Schicht, in der die Verarbeitung erfolgt. Danach wird das Repository aufgerufen, welches den eigentlichen Datenbankzugriff übernimmt. Die SQLite-Datenbank speichert den Datensatz anschließend dauerhaft. Durch diesen Ablauf wird sichtbar, wie die Anwendung in klar getrennten Schichten arbeitet und Daten sauber von der Eingabe bis zur Persistenz verarbeitet werden.</text:p>
      <text:p text:style-name="P6"><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7:41:40.936769511</meta:creation-date>
    <dc:date>2026-05-11T11:22:37.312598946</dc:date>
    <meta:editing-duration>PT4M19S</meta:editing-duration>
    <meta:editing-cycles>2</meta:editing-cycles>
    <meta:generator>LibreOffice/26.2.2.2$Linux_X86_64 LibreOffice_project/620$Build-2</meta:generator>
    <meta:document-statistic meta:table-count="0" meta:image-count="0" meta:object-count="0" meta:page-count="1" meta:paragraph-count="18" meta:word-count="193" meta:character-count="1638" meta:non-whitespace-character-count="1413"/>
  </office:meta>
</office:document-meta>
</file>