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8" style:family="paragraph" style:parent-style-name="Heading_20_2">
      <style:paragraph-properties fo:margin-left="0cm" fo:margin-right="0cm" fo:text-indent="0cm" style:auto-text-indent="false" fo:padding="0cm" fo:border="none"/>
      <style:text-properties style:text-underline-style="solid" style:text-underline-width="auto" style:text-underline-color="font-color"/>
    </style:style>
    <style:style style:name="P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3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16" style:family="paragraph" style:parent-style-name="Heading_20_2">
      <style:paragraph-properties fo:margin-left="0cm" fo:margin-right="0cm" fo:text-indent="0cm" style:auto-text-indent="false" fo:padding="0cm" fo:border="none"/>
      <style:text-properties style:text-underline-style="solid" style:text-underline-width="auto" style:text-underline-color="font-color" officeooo:rsid="0011e01e" officeooo:paragraph-rsid="0011e01e"/>
    </style:style>
    <style:style style:name="T1" style:family="text">
      <style:text-properties loext:padding="0cm" loext:border="none"/>
    </style:style>
    <style:style style:name="T2" style:family="text">
      <style:text-properties officeooo:rsid="0011e01e" loext:padding="0cm" loext:border="none"/>
    </style:style>
    <style:style style:name="T3" style:family="text">
      <style:text-properties officeooo:rsid="0011e01e"/>
    </style:style>
    <style:style style:name="T4" style:family="text">
      <style:text-properties officeooo:rsid="0012403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entitten"/>Entitäten</text:h>
      <text:h text:style-name="P2" text:outline-level="2"/>
      <text:h text:style-name="P2" text:outline-level="2"><text:bookmark text:name="1-basearticle"/>1) BaseArticle</text:h>
      <text:list text:style-name="L1">
        <text:list-item>
          <text:p text:style-name="P3"><text:span text:style-name="Strong_20_Emphasis"><text:span text:style-name="T1">articleID</text:span></text:span> <text:span text:style-name="T1">Schl</text:span><text:span text:style-name="T2">ü</text:span><text:span text:style-name="T1">sselattribut</text:span></text:p>
        </text:list-item>
        <text:list-item>
          <text:p text:style-name="P3">articleName</text:p>
        </text:list-item>
        <text:list-item>
          <text:p text:style-name="P3">articlePrice</text:p>
        </text:list-item>
        <text:list-item>
          <text:p text:style-name="P3">stock</text:p>
        </text:list-item>
      </text:list>
      <text:p text:style-name="P4"><text:span text:style-name="Source_20_Text"><text:span text:style-name="T1">BaseArticle</text:span></text:span> ist die Oberklasse für alle Artikel und eignet sich im ER-Modell als gemeinsame Basisentität.</text:p>
      <text:h text:style-name="P2" text:outline-level="2"/>
      <text:h text:style-name="P2" text:outline-level="2"><text:bookmark text:name="2-article"/>2) Article</text:h>
      <text:list text:style-name="L2">
        <text:list-item>
          <text:p text:style-name="P5"><text:span text:style-name="Strong_20_Emphasis"><text:span text:style-name="T1">articleID</text:span></text:span> <text:span text:style-name="T1">Schl</text:span><text:span text:style-name="T2">ü</text:span><text:span text:style-name="T1">sselattribut, </text:span><text:span text:style-name="T2">ü</text:span><text:span text:style-name="T1">bernommen von BaseArticle</text:span></text:p>
        </text:list-item>
        <text:list-item>
          <text:p text:style-name="P5">minimumStock</text:p>
        </text:list-item>
      </text:list>
      <text:p text:style-name="P4"><text:span text:style-name="Source_20_Text"><text:span text:style-name="T1">Article</text:span></text:span> ist eine Spezialisierung von <text:span text:style-name="Source_20_Text"><text:span text:style-name="T1">BaseArticle</text:span></text:span>. Im Chen-Modell wird so etwas oft als Supertyp/Subtyp modelliert.</text:p>
      <text:h text:style-name="P2" text:outline-level="2"/>
      <text:h text:style-name="P2" text:outline-level="2"><text:bookmark text:name="3-pokemoncard"/>3) PokemonCard</text:h>
      <text:list text:style-name="L3">
        <text:list-item>
          <text:p text:style-name="P6"><text:span text:style-name="Strong_20_Emphasis"><text:span text:style-name="T1">articleID</text:span></text:span> <text:span text:style-name="T1">Schl</text:span><text:span text:style-name="T2">ü</text:span><text:span text:style-name="T1">sselattribut, </text:span><text:span text:style-name="T2">ü</text:span><text:span text:style-name="T1">bernommen von BaseArticle</text:span></text:p>
        </text:list-item>
        <text:list-item>
          <text:p text:style-name="P6">setName</text:p>
        </text:list-item>
        <text:list-item>
          <text:p text:style-name="P6">releaseYear</text:p>
        </text:list-item>
        <text:list-item>
          <text:p text:style-name="P6">condition</text:p>
        </text:list-item>
        <text:list-item>
          <text:p text:style-name="P6">holoType</text:p>
        </text:list-item>
        <text:list-item>
          <text:p text:style-name="P6">language</text:p>
        </text:list-item>
        <text:list-item>
          <text:p text:style-name="P6">firstEdition</text:p>
        </text:list-item>
      </text:list>
      <text:p text:style-name="P4">Auch <text:span text:style-name="Source_20_Text"><text:span text:style-name="T1">PokemonCard</text:span></text:span> ist eine Spezialisierung von <text:span text:style-name="Source_20_Text"><text:span text:style-name="T1">BaseArticle</text:span></text:span>. Die gemeinsamen Stammdaten bleiben im Supertyp, die kartenspezifischen Felder kommen in den Subtyp.</text:p>
      <text:h text:style-name="P2" text:outline-level="2"><text:soft-page-break/></text:h>
      <text:h text:style-name="P2" text:outline-level="2"><text:bookmark text:name="4-stockmovement"/>4) StockMovement</text:h>
      <text:list text:style-name="L4">
        <text:list-item>
          <text:p text:style-name="P7"><text:span text:style-name="Strong_20_Emphasis"><text:span text:style-name="T1">MovementID,</text:span></text:span> <text:span text:style-name="T3">Fremdschlüssel</text:span></text:p>
        </text:list-item>
        <text:list-item>
          <text:p text:style-name="P7">timestamp</text:p>
        </text:list-item>
        <text:list-item>
          <text:p text:style-name="P7">amount</text:p>
        </text:list-item>
        <text:list-item>
          <text:p text:style-name="P7">movementType</text:p>
        </text:list-item>
      </text:list>
      <text:p text:style-name="P4"/>
      <text:p text:style-name="P4">Aus de<text:span text:style-name="T3">m </text:span>Code gibt es noch keine eindeutige Bewegungs-ID, aber für ein sauberes ER-Modell ist so ein Schlüssel sehr sinnvoll. Ohne eigene ID wäre der Primärschlüssel nur schwer eindeutig und stabil zu definieren.</text:p>
      <text:h text:style-name="P8" text:outline-level="2"/>
      <text:h text:style-name="P8" text:outline-level="2"><text:bookmark text:name="beziehungen"/>Beziehungen</text:h>
      <text:h text:style-name="P2" text:outline-level="2"/>
      <text:h text:style-name="P2" text:outline-level="2"><text:bookmark text:name="1-basearticle--ist-spezialisiert-in--article"/>1) BaseArticle — ist spezialisiert in — Article</text:h>
      <text:list text:style-name="L5">
        <text:list-item>
          <text:p text:style-name="P9">Kardinalität: <text:span text:style-name="Source_20_Text"><text:span text:style-name="T1">BaseArticle 1 : 0..1 Article</text:span></text:span></text:p>
        </text:list-item>
        <text:list-item>
          <text:p text:style-name="P9">Bedeutung: Ein Basiseintrag kann optional genau ein Standardartikel sein.</text:p>
        </text:list-item>
      </text:list>
      <text:h text:style-name="P2" text:outline-level="2"/>
      <text:h text:style-name="P2" text:outline-level="2"><text:bookmark text:name="2-basearticle--ist-spezialisiert-in--pokemoncard"/>2) BaseArticle — ist spezialisiert in — PokemonCard</text:h>
      <text:list text:style-name="L6">
        <text:list-item>
          <text:p text:style-name="P10">Kardinalität: <text:span text:style-name="Source_20_Text"><text:span text:style-name="T1">BaseArticle 1 : 0..1 PokemonCard</text:span></text:span></text:p>
        </text:list-item>
        <text:list-item>
          <text:p text:style-name="P10">Bedeutung: Ein Basiseintrag kann optional genau eine Pokémon-Karte sein.</text:p>
        </text:list-item>
      </text:list>
      <text:p text:style-name="P4">Diese Spezialisierung ist in Chen-Notation als Supertyp/Subtyp-Struktur darstellbar.</text:p>
      <text:h text:style-name="P2" text:outline-level="2"/>
      <text:h text:style-name="P2" text:outline-level="2"><text:bookmark text:name="3-basearticle--hat--stockmovement"/>3) BaseArticle — hat — StockMovement</text:h>
      <text:list text:style-name="L7">
        <text:list-item>
          <text:p text:style-name="P11">Kardinalität: <text:span text:style-name="Source_20_Text"><text:span text:style-name="T1">BaseArticle 1 : N StockMovement</text:span></text:span></text:p>
        </text:list-item>
        <text:list-item>
          <text:p text:style-name="P11">Bedeutung: Ein Artikel kann viele Lagerbewegungen haben, jede Bewegung gehört genau zu einem Artikel.</text:p>
        </text:list-item>
      </text:list>
      <text:p text:style-name="P4"><text:soft-page-break/>Das passt sehr gut zu <text:span text:style-name="T3">der </text:span><text:span text:style-name="Source_20_Text"><text:span text:style-name="T1">Inventory</text:span></text:span>-Logik, weil Bewegungen immer auf eine Artikelnummer verweisen.</text:p>
      <text:h text:style-name="P2" text:outline-level="2"><text:bookmark text:name="4-inventory"/>4) Inventory</text:h>
      <text:p text:style-name="P4"><text:span text:style-name="Source_20_Text"><text:span text:style-name="T1">Inventory</text:span></text:span> würde ich <text:span text:style-name="Strong_20_Emphasis"><text:span text:style-name="T1">nicht</text:span></text:span> als Entität modellieren, weil es <text:span text:style-name="T3">in diesem Fall</text:span> eher eine Anwendungs-/Verwaltungslogik ist, keine persistente Fachentität. <text:span text:style-name="T3">Eventuell </text:span>kann man <text:span text:style-name="Source_20_Text"><text:span text:style-name="T1">Inventory</text:span></text:span> als aggregierende Umgebung oder als fachliches Konzept weglassen.</text:p>
      <text:h text:style-name="P2" text:outline-level="2"/>
      <text:h text:style-name="P8" text:outline-level="2"><text:bookmark text:name="textform-fr-dein-diagramm"/>Textform <text:span text:style-name="T4">des</text:span> Diagramm<text:span text:style-name="T4">s</text:span></text:h>
      <text:p text:style-name="P12"/>
      <text:p text:style-name="P12"/>
      <text:p text:style-name="P13"><text:span text:style-name="Source_20_Text"><text:span text:style-name="T1">BASE_ARTICLE</text:span></text:span></text:p>
      <text:p text:style-name="P13"><text:span text:style-name="Source_20_Text"><text:span text:style-name="T1">- articleID (PK)</text:span></text:span></text:p>
      <text:p text:style-name="P13"><text:span text:style-name="Source_20_Text"><text:span text:style-name="T1">- articleName</text:span></text:span></text:p>
      <text:p text:style-name="P13"><text:span text:style-name="Source_20_Text"><text:span text:style-name="T1">- articlePrice</text:span></text:span></text:p>
      <text:p text:style-name="P13"><text:span text:style-name="Source_20_Text"><text:span text:style-name="T1">- stock</text:span></text:span></text:p>
      <text:p text:style-name="P13"/>
      <text:p text:style-name="P13"><text:span text:style-name="Source_20_Text"><text:span text:style-name="T1">ISA</text:span></text:span></text:p>
      <text:p text:style-name="P13"><text:span text:style-name="Source_20_Text"><text:span text:style-name="T1">BASE_ARTICLE -&gt; ARTICLE</text:span></text:span></text:p>
      <text:p text:style-name="P13"><text:span text:style-name="Source_20_Text"><text:span text:style-name="T1">- minimumStock</text:span></text:span></text:p>
      <text:p text:style-name="P13"/>
      <text:p text:style-name="P13"><text:span text:style-name="Source_20_Text"><text:span text:style-name="T1">ISA</text:span></text:span></text:p>
      <text:p text:style-name="P13"><text:span text:style-name="Source_20_Text"><text:span text:style-name="T1">BASE_ARTICLE -&gt; POKEMON_CARD</text:span></text:span></text:p>
      <text:p text:style-name="P13"><text:span text:style-name="Source_20_Text"><text:span text:style-name="T1">- setName</text:span></text:span></text:p>
      <text:p text:style-name="P13"><text:span text:style-name="Source_20_Text"><text:span text:style-name="T1">- releaseYear</text:span></text:span></text:p>
      <text:p text:style-name="P13"><text:span text:style-name="Source_20_Text"><text:span text:style-name="T1">- condition</text:span></text:span></text:p>
      <text:p text:style-name="P13"><text:span text:style-name="Source_20_Text"><text:span text:style-name="T1">- holoType</text:span></text:span></text:p>
      <text:p text:style-name="P13"><text:span text:style-name="Source_20_Text"><text:span text:style-name="T1">- language</text:span></text:span></text:p>
      <text:p text:style-name="P13"><text:span text:style-name="Source_20_Text"><text:span text:style-name="T1">- firstEdition</text:span></text:span></text:p>
      <text:p text:style-name="P13"/>
      <text:p text:style-name="P13"><text:span text:style-name="Source_20_Text"><text:span text:style-name="T1">BASE_ARTICLE 1 ---- N STOCK_MOVEMENT</text:span></text:span></text:p>
      <text:p text:style-name="P13"><text:span text:style-name="Source_20_Text"><text:span text:style-name="T1">STOCK_MOVEMENT</text:span></text:span></text:p>
      <text:p text:style-name="P13"><text:span text:style-name="Source_20_Text"><text:span text:style-name="T1">- movementID (PK)</text:span></text:span></text:p>
      <text:p text:style-name="P13"><text:span text:style-name="Source_20_Text"><text:span text:style-name="T1">- timestamp</text:span></text:span></text:p>
      <text:p text:style-name="P13"><text:span text:style-name="Source_20_Text"><text:span text:style-name="T1">- amount</text:span></text:span></text:p>
      <text:p text:style-name="P14"><text:span text:style-name="Source_20_Text"><text:span text:style-name="T1">- movementType</text:span></text:span></text:p>
      <text:h text:style-name="P8" text:outline-level="2"><text:bookmark text:name="wichtig-fr-deine-umsetzung"/>Wichtig für Umsetzung</text:h>
      <text:p text:style-name="P4"/>
      <text:p text:style-name="P4">Wenn Chen-Diagramm:</text:p>
      <text:list text:style-name="L8">
        <text:list-item>
          <text:p text:style-name="P15"><text:span text:style-name="Strong_20_Emphasis"><text:span text:style-name="T1">Rechtecke</text:span></text:span> für <text:span text:style-name="Source_20_Text"><text:span text:style-name="T1">BaseArticle</text:span></text:span>, <text:span text:style-name="Source_20_Text"><text:span text:style-name="T1">Article</text:span></text:span>, <text:span text:style-name="Source_20_Text"><text:span text:style-name="T1">PokemonCard</text:span></text:span>, <text:span text:style-name="Source_20_Text"><text:span text:style-name="T1">StockMovement</text:span></text:span>.</text:p>
        </text:list-item>
        <text:list-item>
          <text:p text:style-name="P15"><text:span text:style-name="Strong_20_Emphasis"><text:span text:style-name="T1">Ovale</text:span></text:span> für die Attribute.</text:p>
        </text:list-item>
        <text:list-item>
          <text:p text:style-name="P15"><text:span text:style-name="Strong_20_Emphasis"><text:span text:style-name="T1">Raute</text:span></text:span> für die Beziehung <text:span text:style-name="Source_20_Text"><text:span text:style-name="T1">hat</text:span></text:span> zwischen Artikel und Lagerbewegung.</text:p>
        </text:list-item>
        <text:list-item>
          <text:p text:style-name="P15"><text:span text:style-name="Strong_20_Emphasis"><text:span text:style-name="T1">Unterstrichene Attribute</text:span></text:span> für Schlüsselattribute wie <text:span text:style-name="Source_20_Text"><text:span text:style-name="T1">articleID</text:span></text:span> und <text:span text:style-name="Source_20_Text"><text:span text:style-name="T1">movementID</text:span></text:span>.</text:p>
        </text:list-item>
      </text:list>
      <text:h text:style-name="P16" text:outline-level="2"><text:soft-page-break/>Änderung</text:h>
      <text:p text:style-name="P4"/>
      <text:p text:style-name="P4">Für ein professionelleres ER-Modell <text:span text:style-name="Source_20_Text"><text:span text:style-name="T1">StockMovement</text:span></text:span> noch mit <text:span text:style-name="Source_20_Text"><text:span text:style-name="T1">movementID</text:span></text:span> ergänzen, weil <text:span text:style-name="Source_20_Text"><text:span text:style-name="T1">timestamp + articleID + amount</text:span></text:span> als Schlüssel im Alltag unpraktisch sein kann. Das ist keine Pflicht, aber fürs Datenmodell saubere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7:22:19.485808030</meta:creation-date>
    <dc:date>2026-05-11T12:57:37.181035393</dc:date>
    <meta:editing-duration>PT1H50M10S</meta:editing-duration>
    <meta:editing-cycles>3</meta:editing-cycles>
    <meta:generator>LibreOffice/26.2.2.2$Linux_X86_64 LibreOffice_project/620$Build-2</meta:generator>
    <meta:document-statistic meta:table-count="0" meta:image-count="0" meta:object-count="0" meta:page-count="4" meta:paragraph-count="71" meta:word-count="381" meta:character-count="2738" meta:non-whitespace-character-count="2449"/>
  </office:meta>
</office:document-meta>
</file>