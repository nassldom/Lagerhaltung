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2">
      <style:text-properties style:font-name="Ubuntu" style:text-underline-style="solid" style:text-underline-width="auto" style:text-underline-color="font-color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  <style:text-properties style:font-name="Ubuntu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>
      <style:text-properties style:font-name="Ubuntu"/>
    </style:style>
    <style:style style:name="P5" style:family="paragraph" style:parent-style-name="Preformatted_20_Text">
      <style:paragraph-properties fo:margin-left="0cm" fo:margin-right="0cm" fo:text-indent="0cm" style:auto-text-indent="false" fo:padding="0cm" fo:border="none"/>
      <style:text-properties style:font-name="Ubuntu" loext:padding="0cm" loext:border="none"/>
    </style:style>
    <style:style style:name="P6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7" style:family="paragraph" style:parent-style-name="Preformatted_20_Text">
      <style:paragraph-properties fo:margin-left="0cm" fo:margin-right="0cm" fo:text-indent="0cm" style:auto-text-indent="false" fo:padding="0cm" fo:border="none"/>
      <style:text-properties style:font-name="Ubuntu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9" style:family="paragraph" style:parent-style-name="Standard">
      <style:text-properties style:font-name="Ubuntu"/>
    </style:style>
    <style:style style:name="T1" style:family="text">
      <style:text-properties style:font-name="Ubuntu"/>
    </style:style>
    <style:style style:name="T2" style:family="text">
      <style:text-properties style:font-name="Ubuntu" officeooo:rsid="00106b2b"/>
    </style:style>
    <style:style style:name="T3" style:family="text">
      <style:text-properties style:font-name="Ubuntu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beschreibung-des-architekturdiagramms"/>Beschreibung des Architekturdiagramms</text:h>
      <text:p text:style-name="P2"/>
      <text:p text:style-name="P3"><text:span text:style-name="T1">Das Architekturdiagramm zeigt die im Projekt umgesetzte Schichtenstruktur. Die Benutzerschnittstelle ist auf die Konsolen-</text:span><text:span text:style-name="T2">I</text:span><text:span text:style-name="T1">nteraktion beschränkt und enthält keine fachliche Verarbeitung. Die Domänen-</text:span><text:span text:style-name="T2">S</text:span><text:span text:style-name="T1">chicht übernimmt die eigentliche Fachlogik und enthält die Artikel-, Bewegungs- und Bestandsverwaltung. Der Datenbankzugriff erfolgt ausschließlich über die Persistenz-</text:span><text:span text:style-name="T2">S</text:span><text:span text:style-name="T1">chicht mit Repository und </text:span><text:span text:style-name="Source_20_Text"><text:span text:style-name="T3">DatabaseManager</text:span></text:span><text:span text:style-name="T1">. Dadurch werden direkte Abhängigkeiten zwischen Benutzeroberfläche und Datenbank vermieden. Die gewählte Architektur erleichtert die Wartung und erlaubt es, die Anwendung später beispielsweise um eine REST-Schnittstelle oder eine Weboberfläche zu erweitern.</text:span></text:p>
      <text:p text:style-name="P4"/>
      <text:h text:style-name="P1" text:outline-level="2"><text:bookmark text:name="architekturdiagramm"/>Architekturdiagramm</text:h>
      <text:p text:style-name="P2"/>
      <text:p text:style-name="P3"><text:span text:style-name="T1">Die Anwendung wurde im Rahmen des Projektes in eine klar strukturierte Schichtenarchitektur überführt. Die Benutzerschnittstelle besteht aus der </text:span><text:span text:style-name="Source_20_Text"><text:span text:style-name="T3">Main</text:span></text:span><text:span text:style-name="T1">-Klasse beziehungsweise einem optionalen </text:span><text:span text:style-name="Source_20_Text"><text:span text:style-name="T3">ConsoleMenu</text:span></text:span><text:span text:style-name="T1"> und ist ausschließlich für Menüführung, Eingaben und Ausgaben zuständig. Die fachliche Koordination erfolgt in der Domänenlogik, insbesondere in der Klasse </text:span><text:span text:style-name="Source_20_Text"><text:span text:style-name="T3">Inventory</text:span></text:span><text:span text:style-name="T1">, die die Artikel- und Bewegungsverwaltung übernimmt. Die Persistenz-</text:span><text:span text:style-name="T2">S</text:span><text:span text:style-name="T1">chicht kapselt sämtliche Datenbankzugriffe auf die SQLite-Datenbank, wodurch die restliche Anwendung unabhängig von den konkreten Zugriffsdetails bleibt. Diese Struktur verbessert Wartbarkeit, Testbarkeit und Erweiterbarkeit der Software deutlich.</text:span></text:p>
      <text:p text:style-name="P5"/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oft-page-break/><text:span text:style-name="Source_20_Text"><text:span text:style-name="T3">flowchart TD</text:span></text:span></text:p>
      <text:p text:style-name="P6"><text:span text:style-name="Source_20_Text"><text:span text:style-name="T3">subgraph UI[Benutzerschnittstelle]</text:span></text:span></text:p>
      <text:p text:style-name="P6"><text:span text:style-name="Source_20_Text"><text:span text:style-name="T3">Main[Main]</text:span></text:span></text:p>
      <text:p text:style-name="P6"><text:span text:style-name="Source_20_Text"><text:span text:style-name="T3">ConsoleMenu[ConsoleMenu]</text:span></text:span></text:p>
      <text:p text:style-name="P6"><text:span text:style-name="Source_20_Text"><text:span text:style-name="T3">end</text:span></text:span></text:p>
      <text:p text:style-name="P7"/>
      <text:p text:style-name="P6"><text:span text:style-name="Source_20_Text"><text:span text:style-name="T3">subgraph Domain[Domänenschicht]</text:span></text:span></text:p>
      <text:p text:style-name="P6"><text:span text:style-name="Source_20_Text"><text:span text:style-name="T3">Inventory[Inventory]</text:span></text:span></text:p>
      <text:p text:style-name="P6"><text:span text:style-name="Source_20_Text"><text:span text:style-name="T3">BaseArticle[BaseArticle]</text:span></text:span></text:p>
      <text:p text:style-name="P6"><text:span text:style-name="Source_20_Text"><text:span text:style-name="T3">Article[Article]</text:span></text:span></text:p>
      <text:p text:style-name="P6"><text:span text:style-name="Source_20_Text"><text:span text:style-name="T3">PokemonCard[PokemonCard]</text:span></text:span></text:p>
      <text:p text:style-name="P6"><text:span text:style-name="Source_20_Text"><text:span text:style-name="T3">StockMovement[StockMovement]</text:span></text:span></text:p>
      <text:p text:style-name="P6"><text:span text:style-name="Source_20_Text"><text:span text:style-name="T3">Enums[MovementType / HoloType / CardCondition]</text:span></text:span></text:p>
      <text:p text:style-name="P6"><text:span text:style-name="Source_20_Text"><text:span text:style-name="T3">end</text:span></text:span></text:p>
      <text:p text:style-name="P7"/>
      <text:p text:style-name="P6"><text:span text:style-name="Source_20_Text"><text:span text:style-name="T3">subgraph Persistence[Persistenzschicht]</text:span></text:span></text:p>
      <text:p text:style-name="P6"><text:span text:style-name="Source_20_Text"><text:span text:style-name="T3">Repo[PokemonCardRepository]</text:span></text:span></text:p>
      <text:p text:style-name="P6"><text:span text:style-name="Source_20_Text"><text:span text:style-name="T3">DB[DatabaseManager]</text:span></text:span></text:p>
      <text:p text:style-name="P6"><text:span text:style-name="Source_20_Text"><text:span text:style-name="T3">SQLite[(SQLite-Datenbank)]</text:span></text:span></text:p>
      <text:p text:style-name="P6"><text:span text:style-name="Source_20_Text"><text:span text:style-name="T3">end</text:span></text:span></text:p>
      <text:p text:style-name="P7"/>
      <text:p text:style-name="P6"><text:span text:style-name="Source_20_Text"><text:span text:style-name="T3">Main --&gt; Inventory</text:span></text:span></text:p>
      <text:p text:style-name="P6"><text:span text:style-name="Source_20_Text"><text:span text:style-name="T3">ConsoleMenu --&gt; Inventory</text:span></text:span></text:p>
      <text:p text:style-name="P6"><text:span text:style-name="Source_20_Text"><text:span text:style-name="T3">Inventory --&gt; BaseArticle</text:span></text:span></text:p>
      <text:p text:style-name="P6"><text:span text:style-name="Source_20_Text"><text:span text:style-name="T3">Inventory --&gt; Article</text:span></text:span></text:p>
      <text:p text:style-name="P6"><text:span text:style-name="Source_20_Text"><text:span text:style-name="T3">Inventory --&gt; PokemonCard</text:span></text:span></text:p>
      <text:p text:style-name="P6"><text:span text:style-name="Source_20_Text"><text:span text:style-name="T3">Inventory --&gt; StockMovement</text:span></text:span></text:p>
      <text:p text:style-name="P6"><text:span text:style-name="Source_20_Text"><text:span text:style-name="T3">PokemonCard --&gt; Enums</text:span></text:span></text:p>
      <text:p text:style-name="P6"><text:span text:style-name="Source_20_Text"><text:span text:style-name="T3">StockMovement --&gt; Enums</text:span></text:span></text:p>
      <text:p text:style-name="P6"><text:span text:style-name="Source_20_Text"><text:span text:style-name="T3">Repo --&gt; DB</text:span></text:span></text:p>
      <text:p text:style-name="P8"><text:span text:style-name="Source_20_Text"><text:span text:style-name="T3">DB --&gt; SQLite</text:span>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7T17:35:36.567588893</meta:creation-date>
    <dc:date>2026-05-11T10:55:02.971433602</dc:date>
    <meta:editing-duration>PT9M30S</meta:editing-duration>
    <meta:editing-cycles>3</meta:editing-cycles>
    <meta:generator>LibreOffice/26.2.2.2$Linux_X86_64 LibreOffice_project/620$Build-2</meta:generator>
    <meta:document-statistic meta:table-count="0" meta:image-count="0" meta:object-count="0" meta:page-count="2" meta:paragraph-count="32" meta:word-count="222" meta:character-count="2006" meta:non-whitespace-character-count="1826"/>
  </office:meta>
</office:document-meta>
</file>