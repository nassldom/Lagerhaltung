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01fb80a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1fb80a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eschreibung-des-klassendiagramms"/>Beschreibung des Klassendiagramms</text:h>
      <text:p text:style-name="P2"/>
      <text:p text:style-name="P2">Das Klassendiagramm verdeutlicht den objektorientierten Aufbau der Anwendung. Die abstrakte Klasse <text:span text:style-name="Source_20_Text"><text:span text:style-name="T1">BaseArticle</text:span></text:span> enthält gemeinsame Attribute und Methoden aller Artikeltypen. Die Klasse <text:span text:style-name="Source_20_Text"><text:span text:style-name="T1">Article</text:span></text:span> erweitert diese Grundstruktur um zusätzliche, artikelbezogene Eigenschaften wie den Mindestbestand. Die Klasse <text:span text:style-name="Source_20_Text"><text:span text:style-name="T1">PokemonCard</text:span></text:span> ergänzt die Basisdaten um kartenspezifische Eigenschaften. Die Klasse <text:span text:style-name="Source_20_Text"><text:span text:style-name="T1">Inventory</text:span></text:span> bildet das fachliche Zentrum der Anwendung und verwaltet sowohl die Artikel als auch die Lagerbewegungen. Die Klasse <text:span text:style-name="Source_20_Text"><text:span text:style-name="T1">StockMovement</text:span></text:span> dient der Nachvollziehbarkeit von Zugängen und Abgängen und verwendet das Enum <text:span text:style-name="Source_20_Text"><text:span text:style-name="T1">MovementType</text:span></text:span>, um Buchungsarten eindeutig abzubilden. <text:span text:style-name="Source_20_Text"><text:span text:style-name="T1">PokemonCardRepository</text:span></text:span> und <text:span text:style-name="Source_20_Text"><text:span text:style-name="T1">DatabaseManager</text:span></text:span> bilden die Persistenzschicht und kapseln den SQLite-Datenbankzugriff. Insgesamt wird durch das Diagramm deutlich, dass Kapselung, Vererbung, Polymorphie und Schichtentrennung im Projekt gezielt eingesetzt wurden.</text:p>
      <text:p text:style-name="Text_20_body"/>
      <text:h text:style-name="P1" text:outline-level="2"><text:bookmark text:name="klassendiagramm"/>Klassendiagramm</text:h>
      <text:p text:style-name="P2"/>
      <text:p text:style-name="P2">Das Klassendiagramm bildet die Kernstruktur der Domänenschicht sowie die Erweiterung um datenbankspezifische Komponenten ab. Die abstrakte Oberklasse <text:span text:style-name="Source_20_Text"><text:span text:style-name="T1">BaseArticle</text:span></text:span> definiert gemeinsame Merkmale wie Artikelnummer, Name, Preis und aktuellen Bestand. Darauf aufbauend erweitert die Klasse <text:span text:style-name="Source_20_Text"><text:span text:style-name="T1">PokemonCard</text:span></text:span> diese Grundstruktur um kartenspezifische Attribute wie Setname, Erscheinungsjahr, Zustand, Holo-Typ, Sprache und die Information, ob es sich um eine First Edition handelt. Die Klasse <text:span text:style-name="Source_20_Text"><text:span text:style-name="T1">Inventory</text:span></text:span> verwaltet Sammlungen von Artikeln und Lagerbewegungen und enthält zentrale Methoden zur Bestandsführung sowie zu statistischen Auswertungen. Lagerbewegungen werden durch die Klasse <text:span text:style-name="Source_20_Text"><text:span text:style-name="T1">StockMovement</text:span></text:span> modelliert. Für klar definierte Zustände und Typen werden Enums wie <text:span text:style-name="Source_20_Text"><text:span text:style-name="T1">MovementType</text:span></text:span>, <text:span text:style-name="Source_20_Text"><text:span text:style-name="T1">HoloType</text:span></text:span> und <text:span text:style-name="Source_20_Text"><text:span text:style-name="T1">CardCondition</text:span></text:span> verwendet. Ergänzt wird die Struktur durch die Persistenzschicht mit <text:span text:style-name="Source_20_Text"><text:span text:style-name="T1">DatabaseManager</text:span></text:span> und <text:span text:style-name="Source_20_Text"><text:span text:style-name="T1">PokemonCardRepository</text:span></text:span>.</text:p>
      <text:p text:style-name="P3"/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5"><text:soft-page-break/><text:span text:style-name="Source_20_Text"><text:span text:style-name="T2">KlassenDiagramm</text:span></text:span></text:p>
      <text:p text:style-name="P4"><text:span text:style-name="Source_20_Text"><text:span text:style-name="T1">class BaseArticle {</text:span></text:span></text:p>
      <text:p text:style-name="P4"><text:span text:style-name="Source_20_Text"><text:span text:style-name="T1">&lt;&lt;abstract&gt;&gt;</text:span></text:span></text:p>
      <text:p text:style-name="P4"><text:span text:style-name="Source_20_Text"><text:span text:style-name="T1">-String articleID</text:span></text:span></text:p>
      <text:p text:style-name="P4"><text:span text:style-name="Source_20_Text"><text:span text:style-name="T1">-String articleName</text:span></text:span></text:p>
      <text:p text:style-name="P4"><text:span text:style-name="Source_20_Text"><text:span text:style-name="T1">-BigDecimal articlePrice</text:span></text:span></text:p>
      <text:p text:style-name="P4"><text:span text:style-name="Source_20_Text"><text:span text:style-name="T1">-int stock</text:span></text:span></text:p>
      <text:p text:style-name="P4"><text:span text:style-name="Source_20_Text"><text:span text:style-name="T1">+getArticleID() String</text:span></text:span></text:p>
      <text:p text:style-name="P4"><text:span text:style-name="Source_20_Text"><text:span text:style-name="T1">+getArticleName() String</text:span></text:span></text:p>
      <text:p text:style-name="P4"><text:span text:style-name="Source_20_Text"><text:span text:style-name="T1">+getArticlePrice() BigDecimal</text:span></text:span></text:p>
      <text:p text:style-name="P4"><text:span text:style-name="Source_20_Text"><text:span text:style-name="T1">+getStock() int</text:span></text:span></text:p>
      <text:p text:style-name="P4"><text:span text:style-name="Source_20_Text"><text:span text:style-name="T1">+increaseStock(amount:int) void</text:span></text:span></text:p>
      <text:p text:style-name="P4"><text:span text:style-name="Source_20_Text"><text:span text:style-name="T1">+decreaseStock(amount:int) void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Article {</text:span></text:span></text:p>
      <text:p text:style-name="P4"><text:span text:style-name="Source_20_Text"><text:span text:style-name="T1">-int minimumStock</text:span></text:span></text:p>
      <text:p text:style-name="P4"><text:span text:style-name="Source_20_Text"><text:span text:style-name="T1">+getMinimumStock() int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PokemonCard {</text:span></text:span></text:p>
      <text:p text:style-name="P4"><text:span text:style-name="Source_20_Text"><text:span text:style-name="T1">-String setName</text:span></text:span></text:p>
      <text:p text:style-name="P4"><text:span text:style-name="Source_20_Text"><text:span text:style-name="T1">-int releaseYear</text:span></text:span></text:p>
      <text:p text:style-name="P4"><text:span text:style-name="Source_20_Text"><text:span text:style-name="T1">-CardCondition condition</text:span></text:span></text:p>
      <text:p text:style-name="P4"><text:span text:style-name="Source_20_Text"><text:span text:style-name="T1">-HoloType holoType</text:span></text:span></text:p>
      <text:p text:style-name="P4"><text:span text:style-name="Source_20_Text"><text:span text:style-name="T1">-String language</text:span></text:span></text:p>
      <text:p text:style-name="P4"><text:span text:style-name="Source_20_Text"><text:span text:style-name="T1">-boolean firstEdition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Inventory {</text:span></text:span></text:p>
      <text:p text:style-name="P4"><text:span text:style-name="Source_20_Text"><text:span text:style-name="T1">-List~BaseArticle~ articles</text:span></text:span></text:p>
      <text:p text:style-name="P4"><text:span text:style-name="Source_20_Text"><text:span text:style-name="T1">-List~StockMovement~ movements</text:span></text:span></text:p>
      <text:p text:style-name="P4"><text:span text:style-name="Source_20_Text"><text:span text:style-name="T1">+addArticle(article:BaseArticle) void</text:span></text:span></text:p>
      <text:p text:style-name="P4"><text:span text:style-name="Source_20_Text"><text:span text:style-name="T1">+getAllArticles() List~BaseArticle~</text:span></text:span></text:p>
      <text:p text:style-name="P4"><text:span text:style-name="Source_20_Text"><text:span text:style-name="T1">+getArticleByNumber(articleID:String) BaseArticle</text:span></text:span></text:p>
      <text:p text:style-name="P4"><text:span text:style-name="Source_20_Text"><text:span text:style-name="T1">+increaseStock(articleID:String, amount:int) void</text:span></text:span></text:p>
      <text:p text:style-name="P4"><text:span text:style-name="Source_20_Text"><text:span text:style-name="T1">+decreaseStock(articleID:String, amount:int) void</text:span></text:span></text:p>
      <text:p text:style-name="P4"><text:span text:style-name="Source_20_Text"><text:span text:style-name="T1">+getLowStockItems() List~BaseArticle~</text:span></text:span></text:p>
      <text:p text:style-name="P4"><text:span text:style-name="Source_20_Text"><text:span text:style-name="T1">+getArticleCount() int</text:span></text:span></text:p>
      <text:p text:style-name="P4"><text:span text:style-name="Source_20_Text"><text:span text:style-name="T1">+getTotalStock() int</text:span></text:span></text:p>
      <text:p text:style-name="P4"><text:span text:style-name="Source_20_Text"><text:span text:style-name="T1">+getLowStockCount() int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StockMovement {</text:span></text:span></text:p>
      <text:p text:style-name="P4"><text:span text:style-name="Source_20_Text"><text:span text:style-name="T1">-LocalDateTime timestamp</text:span></text:span></text:p>
      <text:p text:style-name="P4"><text:span text:style-name="Source_20_Text"><text:span text:style-name="T1">-String articleID</text:span></text:span></text:p>
      <text:p text:style-name="P4"><text:span text:style-name="Source_20_Text"><text:span text:style-name="T1">-String articleName</text:span></text:span></text:p>
      <text:p text:style-name="P4"><text:span text:style-name="Source_20_Text"><text:span text:style-name="T1">-MovementType movementType</text:span></text:span></text:p>
      <text:p text:style-name="P4"><text:span text:style-name="Source_20_Text"><text:span text:style-name="T1">-int amount</text:span></text:span></text:p>
      <text:p text:style-name="P4"><text:span text:style-name="Source_20_Text"><text:span text:style-name="T1">+getTimestamp() LocalDateTime</text:span></text:span></text:p>
      <text:p text:style-name="P4"><text:span text:style-name="Source_20_Text"><text:span text:style-name="T1">+getArticleID() String</text:span></text:span></text:p>
      <text:p text:style-name="P4"><text:span text:style-name="Source_20_Text"><text:span text:style-name="T1">+getArticleName() String</text:span></text:span></text:p>
      <text:p text:style-name="P4"><text:span text:style-name="Source_20_Text"><text:span text:style-name="T1">+getMovementType() MovementType</text:span></text:span></text:p>
      <text:p text:style-name="P4"><text:span text:style-name="Source_20_Text"><text:span text:style-name="T1">+getAmount() int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PokemonCardRepository {</text:span></text:span></text:p>
      <text:p text:style-name="P4"><text:span text:style-name="Source_20_Text"><text:span text:style-name="T1">+save(pokemonCard:PokemonCard) void</text:span></text:span></text:p>
      <text:p text:style-name="P4"><text:span text:style-name="Source_20_Text"><text:span text:style-name="T1">+saveOrUpdate(pokemonCard:PokemonCard) void</text:span></text:span></text:p>
      <text:p text:style-name="P4"><text:span text:style-name="Source_20_Text"><text:span text:style-name="T1">+findAll() List~PokemonCard~</text:span></text:span></text:p>
      <text:p text:style-name="P4"><text:span text:style-name="Source_20_Text"><text:span text:style-name="T1">+findById(articleID:String) PokemonCard</text:span></text:span></text:p>
      <text:p text:style-name="P4"><text:span text:style-name="Source_20_Text"><text:span text:style-name="T1">+deleteById(articleID:String) boolean</text:span></text:span></text:p>
      <text:p text:style-name="P4"><text:span text:style-name="Source_20_Text"><text:span text:style-name="T1">+deleteAll() void</text:span></text:span></text:p>
      <text:p text:style-name="P4"><text:span text:style-name="Source_20_Text"><text:span text:style-name="T1">}</text:span></text:span></text:p>
      <text:p text:style-name="P4"><text:soft-page-break/></text:p>
      <text:p text:style-name="P4"><text:span text:style-name="Source_20_Text"><text:span text:style-name="T1">class DatabaseManager {</text:span></text:span></text:p>
      <text:p text:style-name="P4"><text:span text:style-name="Source_20_Text"><text:span text:style-name="T1">+getConnection() Connection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MovementType {</text:span></text:span></text:p>
      <text:p text:style-name="P4"><text:span text:style-name="Source_20_Text"><text:span text:style-name="T1">&lt;&lt;enumeration&gt;&gt;</text:span></text:span></text:p>
      <text:p text:style-name="P4"><text:span text:style-name="Source_20_Text"><text:span text:style-name="T1">IN</text:span></text:span></text:p>
      <text:p text:style-name="P4"><text:span text:style-name="Source_20_Text"><text:span text:style-name="T1">OUT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HoloType {</text:span></text:span></text:p>
      <text:p text:style-name="P4"><text:span text:style-name="Source_20_Text"><text:span text:style-name="T1">&lt;&lt;enumeration&gt;&gt;</text:span></text:span></text:p>
      <text:p text:style-name="P4"><text:span text:style-name="Source_20_Text"><text:span text:style-name="T1">NONE</text:span></text:span></text:p>
      <text:p text:style-name="P4"><text:span text:style-name="Source_20_Text"><text:span text:style-name="T1">HOLO</text:span></text:span></text:p>
      <text:p text:style-name="P4"><text:span text:style-name="Source_20_Text"><text:span text:style-name="T1">REVERSE_HOLO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class CardCondition {</text:span></text:span></text:p>
      <text:p text:style-name="P4"><text:span text:style-name="Source_20_Text"><text:span text:style-name="T1">&lt;&lt;enumeration&gt;&gt;</text:span></text:span></text:p>
      <text:p text:style-name="P4"><text:span text:style-name="Source_20_Text"><text:span text:style-name="T1">MINT</text:span></text:span></text:p>
      <text:p text:style-name="P4"><text:span text:style-name="Source_20_Text"><text:span text:style-name="T1">NEAR_MINT</text:span></text:span></text:p>
      <text:p text:style-name="P4"><text:span text:style-name="Source_20_Text"><text:span text:style-name="T1">GOOD</text:span></text:span></text:p>
      <text:p text:style-name="P4"><text:span text:style-name="Source_20_Text"><text:span text:style-name="T1">PLAYED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BaseArticle &lt;|-- Article</text:span></text:span></text:p>
      <text:p text:style-name="P4"><text:span text:style-name="Source_20_Text"><text:span text:style-name="T1">BaseArticle &lt;|-- PokemonCard</text:span></text:span></text:p>
      <text:p text:style-name="P4"><text:span text:style-name="Source_20_Text"><text:span text:style-name="T1">Inventory "1" o-- "0..*" BaseArticle</text:span></text:span></text:p>
      <text:p text:style-name="P4"><text:span text:style-name="Source_20_Text"><text:span text:style-name="T1">Inventory "1" o-- "0..*" StockMovement</text:span></text:span></text:p>
      <text:p text:style-name="P4"><text:span text:style-name="Source_20_Text"><text:span text:style-name="T1">StockMovement --&gt; MovementType</text:span></text:span></text:p>
      <text:p text:style-name="P4"><text:span text:style-name="Source_20_Text"><text:span text:style-name="T1">PokemonCard --&gt; HoloType</text:span></text:span></text:p>
      <text:p text:style-name="P4"><text:span text:style-name="Source_20_Text"><text:span text:style-name="T1">PokemonCard --&gt; CardCondition</text:span></text:span></text:p>
      <text:p text:style-name="P4"><text:span text:style-name="Source_20_Text"><text:span text:style-name="T1">PokemonCardRepository --&gt; DatabaseManager</text:span></text:span></text:p>
      <text:p text:style-name="P6"><text:span text:style-name="Source_20_Text"><text:span text:style-name="T1">PokemonCardRepository --&gt; PokemonCard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7:34:56.476728360</meta:creation-date>
    <dc:date>2026-05-11T11:19:08.601086020</dc:date>
    <meta:editing-duration>PT9M10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3" meta:paragraph-count="93" meta:word-count="400" meta:character-count="3675" meta:non-whitespace-character-count="3373"/>
  </office:meta>
</office:document-meta>
</file>